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500000023188E320805D75DF8B.png" manifest:media-type="image/png"/>
  <manifest:file-entry manifest:full-path="Pictures/1000000100000567000003377E4EB7B4FCD2E7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rebuchet ms" svg:font-family="'trebuchet ms'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fb549" officeooo:paragraph-rsid="001fb549"/>
    </style:style>
    <style:style style:name="P3" style:family="paragraph" style:parent-style-name="Standard">
      <style:paragraph-properties fo:text-align="center" style:justify-single-word="false"/>
      <style:text-properties fo:font-size="10pt" officeooo:rsid="002046ea" officeooo:paragraph-rsid="002046ea" style:font-size-asian="8.75pt" style:font-size-complex="10pt"/>
    </style:style>
    <style:style style:name="T1" style:family="text">
      <style:text-properties officeooo:rsid="001fb5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7129 – <text:span text:style-name="T1">Banco de Dados I – Proposta de Projeto</text:span></text:p>
      <text:p text:style-name="P1"/>
      <text:p text:style-name="P2">Equipe: Alisson Claudino de Jesus (25150409)</text:p>
      <text:p text:style-name="P2">Nome do Projeto: Metereolog – Plataforma de Monitoramento Metereológico</text:p>
      <text:p text:style-name="P2"/>
      <text:p text:style-name="P2">O projeto envolve o desenvolvimento de uma estação meteorológica e de uma plataforma capaz de coletar dados de diversos sensores, transmiti-los para uma plataforma central, armazená-los e disponibilizá-los por meio de uma interface web para visualização e análise. </text:p>
      <text:p text:style-name="P2">Com arquitetura modular e escalável, utiliza-se de uma stack com Python/Django no back-end, Vue.JS e Quasar no front-end, RabbitMQ como broker MQTT e AMQP e PostgreSQL + TimescaleDB para banco de dados.</text:p>
      <text:p text:style-name="P2">As estações metereológicas consistem de sensores conectados a módulos ESP-32, que se conectam via MQTT ao broker para envio dos dados. O back-end então coleta esses dados e armazena-os no banco de dados PostgreSQL, e com extensão TimescaleDB, otimizada para dados de series temporais.</text:p>
      <text:p text:style-name="P2"/>
      <text:p text:style-name="P3"><draw:frame draw:style-name="fr1" draw:name="Image1" text:anchor-type="char" svg:x="-0.1075in" svg:y="0.3583in" svg:width="6.7165in" svg:height="3.9965in" draw:z-index="1"><draw:image xlink:href="Pictures/1000000100000567000003377E4EB7B4FCD2E78F.png" xlink:type="simple" xlink:show="embed" xlink:actuate="onLoad" draw:mime-type="image/png"/></draw:frame>Rascunho de schema de banco de dados para referência</text:p>
      <text:p text:style-name="P2"/>
      <text:p text:style-name="P2"/>
      <text:p text:style-name="P3">Diagrama Arquitetura<draw:frame draw:style-name="fr2" draw:name="Image2" text:anchor-type="char" svg:width="6.6929in" svg:height="2.3236in" draw:z-index="0"><draw:image xlink:href="Pictures/10000001000006500000023188E320805D75DF8B.png" xlink:type="simple" xlink:show="embed" xlink:actuate="onLoad" draw:mime-type="image/png"/></draw:frame>l da Plataform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rebuchet ms" svg:font-family="'trebuchet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9-22T00:56:05.232525353</meta:creation-date>
    <dc:date>2025-09-23T17:14:39.926814467</dc:date>
    <meta:editing-duration>P1DT15H18M7S</meta:editing-duration>
    <meta:editing-cycles>2</meta:editing-cycles>
    <meta:generator>LibreOffice/7.3.2.2$MacOSX_AARCH64 LibreOffice_project/49f2b1bff42cfccbd8f788c8dc32c1c309559be0</meta:generator>
    <meta:document-statistic meta:table-count="0" meta:image-count="2" meta:object-count="0" meta:page-count="1" meta:paragraph-count="8" meta:word-count="149" meta:character-count="1001" meta:non-whitespace-character-count="856"/>
  </office:meta>
</office:document-meta>
</file>